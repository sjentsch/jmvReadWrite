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4936" officeooo:paragraph-rsid="00154936"/>
    </style:style>
    <style:style style:name="P2" style:family="paragraph" style:parent-style-name="Standard">
      <style:text-properties officeooo:paragraph-rsid="00154936"/>
    </style:style>
    <style:style style:name="P3" style:family="paragraph" style:parent-style-name="Standard">
      <style:text-properties fo:font-style="normal" fo:font-weight="normal" officeooo:rsid="00171918" officeooo:paragraph-rsid="0017191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71918" officeooo:paragraph-rsid="002cb168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2ad705" officeooo:paragraph-rsid="002bcb9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ad705" officeooo:paragraph-rsid="002e759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cb168" officeooo:paragraph-rsid="002cb16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cb168" officeooo:paragraph-rsid="002e759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e759f" officeooo:paragraph-rsid="002e759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2ad705" officeooo:paragraph-rsid="002ad705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ad705" officeooo:paragraph-rsid="002cb168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weight="bold" officeooo:rsid="00154936" officeooo:paragraph-rsid="00154936" style:font-weight-asian="bold" style:font-weight-complex="bold"/>
    </style:style>
    <style:style style:name="P13" style:family="paragraph" style:parent-style-name="Standard">
      <style:text-properties officeooo:paragraph-rsid="002bcb9b"/>
    </style:style>
    <style:style style:name="P14" style:family="paragraph" style:parent-style-name="Standard">
      <style:text-properties fo:font-style="italic" fo:font-weight="bold" officeooo:paragraph-rsid="0015493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2cb168" officeooo:paragraph-rsid="002cb168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normal" officeooo:rsid="002cb168" officeooo:paragraph-rsid="002cb168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officeooo:paragraph-rsid="002cb168"/>
    </style:style>
    <style:style style:name="P18" style:family="paragraph" style:parent-style-name="Preformatted_20_Text">
      <style:text-properties fo:font-style="normal" fo:font-weight="normal" officeooo:rsid="002e759f" officeooo:paragraph-rsid="002e759f" style:font-style-asian="normal" style:font-weight-asian="normal" style:font-style-complex="normal" style:font-weight-complex="normal"/>
    </style:style>
    <style:style style:name="P19" style:family="paragraph" style:parent-style-name="Preformatted_20_Text">
      <style:text-properties officeooo:paragraph-rsid="002b97a4"/>
    </style:style>
    <style:style style:name="P20" style:family="paragraph" style:parent-style-name="Preformatted_20_Text">
      <style:text-properties officeooo:rsid="002b97a4" officeooo:paragraph-rsid="002b97a4"/>
    </style:style>
    <style:style style:name="P21" style:family="paragraph" style:parent-style-name="Preformatted_20_Text">
      <style:text-properties officeooo:rsid="002e759f" officeooo:paragraph-rsid="002e759f"/>
    </style:style>
    <style:style style:name="P22" style:family="paragraph" style:parent-style-name="Standard" style:list-style-name="L1">
      <style:text-properties fo:font-style="normal" fo:font-weight="normal" officeooo:rsid="002bcb9b" officeooo:paragraph-rsid="002bcb9b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fo:font-style="normal" fo:font-weight="normal" officeooo:rsid="002cb168" officeooo:paragraph-rsid="002cb168" style:font-style-asian="normal" style:font-weight-asian="normal" style:font-style-complex="normal" style:font-weight-complex="normal"/>
    </style:style>
    <style:style style:name="P24" style:family="paragraph" style:parent-style-name="Standard" style:list-style-name="L4">
      <style:text-properties fo:font-style="normal" fo:font-weight="normal" officeooo:paragraph-rsid="001a3759" style:font-style-asian="normal" style:font-weight-asian="normal" style:font-style-complex="normal" style:font-weight-complex="normal"/>
    </style:style>
    <style:style style:name="P25" style:family="paragraph" style:parent-style-name="Standard" style:list-style-name="L4">
      <style:text-properties fo:font-style="normal" fo:font-weight="normal" officeooo:rsid="00171918" officeooo:paragraph-rsid="00171918" style:font-style-asian="normal" style:font-weight-asian="normal" style:font-style-complex="normal" style:font-weight-complex="normal"/>
    </style:style>
    <style:style style:name="P26" style:family="paragraph" style:parent-style-name="Standard" style:list-style-name="L5">
      <style:text-properties fo:font-style="normal" fo:font-weight="normal" officeooo:rsid="002e759f" officeooo:paragraph-rsid="002e759f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text-properties fo:font-style="normal" officeooo:rsid="0019b883" officeooo:paragraph-rsid="0019b883" style:font-style-asian="normal" style:font-style-complex="normal"/>
    </style:style>
    <style:style style:name="P28" style:family="paragraph" style:parent-style-name="Standard" style:list-style-name="L1">
      <style:text-properties officeooo:rsid="002bcb9b" officeooo:paragraph-rsid="002bcb9b"/>
    </style:style>
    <style:style style:name="P29" style:family="paragraph" style:parent-style-name="Standard" style:list-style-name="L2">
      <style:text-properties officeooo:rsid="00154936" officeooo:paragraph-rsid="00154936"/>
    </style:style>
    <style:style style:name="P30" style:family="paragraph" style:parent-style-name="Standard" style:list-style-name="L3">
      <style:text-properties officeooo:rsid="00154936" officeooo:paragraph-rsid="00154936"/>
    </style:style>
    <style:style style:name="P31" style:family="paragraph" style:parent-style-name="Standard">
      <style:text-properties fo:font-style="italic" fo:font-weight="bold" officeooo:rsid="00154936" officeooo:paragraph-rsid="002cb168" style:font-style-asian="italic" style:font-weight-asian="bold" style:font-style-complex="italic" style:font-weight-complex="bold"/>
    </style:style>
    <style:style style:name="P32" style:family="paragraph" style:parent-style-name="Standard" style:list-style-name="L3">
      <style:text-properties officeooo:paragraph-rsid="00154936"/>
    </style:style>
    <style:style style:name="P33" style:family="paragraph" style:parent-style-name="Standard" style:list-style-name="L3">
      <style:text-properties officeooo:paragraph-rsid="001572c4"/>
    </style:style>
    <style:style style:name="P34" style:family="paragraph" style:parent-style-name="Standard" style:list-style-name="L3">
      <style:text-properties officeooo:paragraph-rsid="0017c8fa"/>
    </style:style>
    <style:style style:name="P35" style:family="paragraph" style:parent-style-name="Standard" style:list-style-name="L3">
      <style:text-properties officeooo:paragraph-rsid="00171918"/>
    </style:style>
    <style:style style:name="P36" style:family="paragraph" style:parent-style-name="Standard" style:list-style-name="L3">
      <style:text-properties officeooo:paragraph-rsid="0019b883"/>
    </style:style>
    <style:style style:name="P37" style:family="paragraph" style:parent-style-name="Standard" style:list-style-name="L3">
      <style:text-properties officeooo:paragraph-rsid="001c4945"/>
    </style:style>
    <style:style style:name="P38" style:family="paragraph" style:parent-style-name="Standard" style:list-style-name="L3">
      <style:text-properties officeooo:rsid="001f210b" officeooo:paragraph-rsid="001f210b"/>
    </style:style>
    <style:style style:name="P39" style:family="paragraph" style:parent-style-name="Standard" style:list-style-name="L3">
      <style:text-properties officeooo:rsid="001572c4" officeooo:paragraph-rsid="001572c4"/>
    </style:style>
    <style:style style:name="P40" style:family="paragraph" style:parent-style-name="Standard" style:list-style-name="L3">
      <style:text-properties officeooo:rsid="001572c4" officeooo:paragraph-rsid="0023e827"/>
    </style:style>
    <style:style style:name="P41" style:family="paragraph" style:parent-style-name="Standard" style:list-style-name="L3">
      <style:text-properties officeooo:rsid="001572c4" officeooo:paragraph-rsid="001c4945"/>
    </style:style>
    <style:style style:name="P42" style:family="paragraph" style:parent-style-name="Standard" style:list-style-name="L3">
      <style:text-properties officeooo:rsid="001b4b35" officeooo:paragraph-rsid="001b4b35"/>
    </style:style>
    <style:style style:name="P43" style:family="paragraph" style:parent-style-name="Standard" style:list-style-name="L3">
      <style:text-properties officeooo:rsid="001b4b35" officeooo:paragraph-rsid="001c4945"/>
    </style:style>
    <style:style style:name="P44" style:family="paragraph" style:parent-style-name="Standard" style:list-style-name="L3">
      <style:text-properties officeooo:rsid="00171918" officeooo:paragraph-rsid="00171918"/>
    </style:style>
    <style:style style:name="P45" style:family="paragraph" style:parent-style-name="Standard" style:list-style-name="L3">
      <style:text-properties officeooo:rsid="0019b883" officeooo:paragraph-rsid="0019b883"/>
    </style:style>
    <style:style style:name="T1" style:family="text">
      <style:text-properties officeooo:rsid="00154936"/>
    </style:style>
    <style:style style:name="T2" style:family="text">
      <style:text-properties officeooo:rsid="001572c4"/>
    </style:style>
    <style:style style:name="T3" style:family="text">
      <style:text-properties officeooo:rsid="00171918"/>
    </style:style>
    <style:style style:name="T4" style:family="text">
      <style:text-properties fo:font-style="italic" fo:font-weight="normal" officeooo:rsid="002cb168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54936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71918" style:font-style-asian="italic" style:font-weight-asian="normal" style:font-style-complex="italic" style:font-weight-complex="normal"/>
    </style:style>
    <style:style style:name="T7" style:family="text">
      <style:text-properties officeooo:rsid="0017c8fa"/>
    </style:style>
    <style:style style:name="T8" style:family="text">
      <style:text-properties officeooo:rsid="0019b883"/>
    </style:style>
    <style:style style:name="T9" style:family="text">
      <style:text-properties officeooo:rsid="001b894a"/>
    </style:style>
    <style:style style:name="T10" style:family="text">
      <style:text-properties officeooo:rsid="001c4945"/>
    </style:style>
    <style:style style:name="T11" style:family="text">
      <style:text-properties officeooo:rsid="001d5b94"/>
    </style:style>
    <style:style style:name="T12" style:family="text">
      <style:text-properties officeooo:rsid="00210ebe"/>
    </style:style>
    <style:style style:name="T13" style:family="text">
      <style:text-properties officeooo:rsid="00224239"/>
    </style:style>
    <style:style style:name="T14" style:family="text">
      <style:text-properties officeooo:rsid="00256b7b"/>
    </style:style>
    <style:style style:name="T15" style:family="text">
      <style:text-properties officeooo:rsid="002ad705"/>
    </style:style>
    <style:style style:name="T16" style:family="text">
      <style:text-properties officeooo:rsid="002b97a4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ad70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b168" style:font-style-asian="normal" style:font-weight-asian="normal" style:font-style-complex="normal" style:font-weight-complex="normal"/>
    </style:style>
    <style:style style:name="T20" style:family="text">
      <style:text-properties style:font-name="Liberation Mono" fo:font-size="10pt" style:font-name-asian="Noto Sans Mono CJK JP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2b97a4" style:font-name-asian="Noto Sans Mono CJK JP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2e759f" style:font-name-asian="Noto Sans Mono CJK JP" style:font-size-asian="10pt" style:font-name-complex="Liberation Mono" style:font-size-complex="10pt"/>
    </style:style>
    <style:style style:name="T23" style:family="text">
      <style:text-properties officeooo:rsid="002bcb9b"/>
    </style:style>
    <style:style style:name="T24" style:family="text">
      <style:text-properties officeooo:rsid="001a3759"/>
    </style:style>
    <style:style style:name="T25" style:family="text">
      <style:text-properties officeooo:rsid="002e75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amovi file format</text:p>
      <text:p text:style-name="P5"><text:span text:style-name="T16">Files written with the jamovi file format (.omv) are ZIP archives that contain a number of files (described below). </text:span><text:span text:style-name="T23">Those are either:</text:span></text:p>
      <text:list xml:id="list2084396134" text:style-name="L1">
        <text:list-item>
          <text:p text:style-name="P22">text files with basic information about the file format (META-INF/MANIFEST.MF);</text:p>
        </text:list-item>
        <text:list-item>
          <text:p text:style-name="P22">json-formatted text files with structured information about the data (e.g., types, data format, etc. for the different columns in the data file, value labels, etc.);</text:p>
        </text:list-item>
        <text:list-item>
          <text:p text:style-name="P22">binary files containing data (data.bin, strings.bin);</text:p>
        </text:list-item>
        <text:list-item>
          <text:p text:style-name="P23">HTML-file with the current state of the output (index.html);</text:p>
        </text:list-item>
        <text:list-item>
          <text:p text:style-name="P28"><text:span text:style-name="T17">binary files that store R</text:span><text:span text:style-name="T19">P</text:span><text:span text:style-name="T17">rotBuf-information for the analyses (e.g., 02 descriptives/analysis); </text:span><text:span text:style-name="T19">or</text:span></text:p>
        </text:list-item>
        <text:list-item>
          <text:p text:style-name="P28"><text:span text:style-name="T17">resource files for the analyses (png-files of graphical outputs / plots; e.g., <text:s/>02 descriptives/ressources/….</text:span><text:span text:style-name="T19">png)</text:span></text:p>
        </text:list-item>
      </text:list>
      <text:p text:style-name="P13"/>
      <text:p text:style-name="P14">META-INF/MANIFEST.MF</text:p>
      <text:p text:style-name="P16">contains meta-information about the format of the current file; since version 1.x.x, these values are as follows:</text:p>
      <text:list xml:id="list2858792130" text:style-name="L2">
        <text:list-item>
          <text:p text:style-name="P29">Manifest-Version: 1.0</text:p>
        </text:list-item>
        <text:list-item>
          <text:p text:style-name="P29">Data-Archive-Version: 1.0.2</text:p>
        </text:list-item>
        <text:list-item>
          <text:p text:style-name="P29">jamovi-Archive-Version: 8.0</text:p>
        </text:list-item>
        <text:list-item>
          <text:p text:style-name="P29">Created-By: jamovi 0.0.0.0</text:p>
        </text:list-item>
      </text:list>
      <text:p text:style-name="P1"/>
      <text:p text:style-name="P31">metadata.json</text:p>
      <text:p text:style-name="P17"><text:span text:style-name="T4">contains meta-information about the data set in JSON-format</text:span><text:span text:style-name="T5"> </text:span><text:span text:style-name="T4">with the </text:span><text:span text:style-name="T6">top-level name dataSet.</text:span></text:p>
      <text:list xml:id="list1017402571" text:style-name="L3">
        <text:list-item>
          <text:p text:style-name="P30">rowCount: number of rows in the data set</text:p>
        </text:list-item>
        <text:list-item>
          <text:p text:style-name="P30">columnCount: number of rows in the data set</text:p>
        </text:list-item>
        <text:list-item>
          <text:p text:style-name="P30">removedRows <text:span text:style-name="T13">(default: empty)</text:span></text:p>
          <text:list>
            <text:list-item>
              <text:p text:style-name="P38">index: line where lines where removed (after this line)</text:p>
            </text:list-item>
            <text:list-item>
              <text:p text:style-name="P38">count: number of removed lines</text:p>
            </text:list-item>
          </text:list>
        </text:list-item>
        <text:list-item>
          <text:p text:style-name="P32"><text:span text:style-name="T3">a</text:span><text:span text:style-name="T1">ddedRows</text:span></text:p>
          <text:list>
            <text:list-item>
              <text:p text:style-name="P32">?</text:p>
            </text:list-item>
          </text:list>
        </text:list-item>
        <text:list-item>
          <text:p text:style-name="P30">fields: contains description for every data column (one field per column)</text:p>
          <text:list>
            <text:list-item>
              <text:p text:style-name="P33">name: <text:span text:style-name="T2">column name</text:span></text:p>
            </text:list-item>
            <text:list-item>
              <text:p text:style-name="P33">id: <text:span text:style-name="T12">column id (numerical; could default to the column number)</text:span></text:p>
            </text:list-item>
            <text:list-item>
              <text:p text:style-name="P33">columnType: <text:span text:style-name="T2">type of data contained in the column</text:span></text:p>
              <text:list>
                <text:list-item>
                  <text:p text:style-name="P39">Data <text:span text:style-name="T12">(default)</text:span></text:p>
                </text:list-item>
                <text:list-item>
                  <text:p text:style-name="P27">Computed</text:p>
                </text:list-item>
                <text:list-item>
                  <text:p text:style-name="P27">Recoded</text:p>
                </text:list-item>
                <text:list-item>
                  <text:p text:style-name="P39">Filter</text:p>
                </text:list-item>
              </text:list>
            </text:list-item>
            <text:list-item>
              <text:p text:style-name="P33"><text:span text:style-name="T9">d</text:span>ataType</text:p>
              <text:list>
                <text:list-item>
                  <text:p text:style-name="P40">Integer <text:span text:style-name="T12">(default)</text:span></text:p>
                </text:list-item>
                <text:list-item>
                  <text:p text:style-name="P39">Decimal </text:p>
                </text:list-item>
                <text:list-item>
                  <text:p text:style-name="P39">Text</text:p>
                </text:list-item>
              </text:list>
            </text:list-item>
            <text:list-item>
              <text:p text:style-name="P33">measureType</text:p>
              <text:list>
                <text:list-item>
                  <text:p text:style-name="P39">ID</text:p>
                </text:list-item>
                <text:list-item>
                  <text:p text:style-name="P40">Nominal <text:span text:style-name="T12">(default)</text:span></text:p>
                </text:list-item>
                <text:list-item>
                  <text:p text:style-name="P39">Ordinal</text:p>
                </text:list-item>
                <text:list-item>
                  <text:p text:style-name="P39">Continuous</text:p>
                </text:list-item>
                <text:list-item>
                  <text:p text:style-name="P42">None?</text:p>
                </text:list-item>
              </text:list>
            </text:list-item>
            <text:list-item>
              <text:p text:style-name="P34">formula <text:span text:style-name="T7">(for Computed Variables): formula used for calculations </text:span><text:span text:style-name="T8">or filters </text:span><text:span text:style-name="T7">(default: </text:span><text:span text:style-name="T2">""</text:span><text:span text:style-name="T7">)</text:span></text:p>
            </text:list-item>
            <text:list-item>
              <text:p text:style-name="P34">formulaMessage: <text:span text:style-name="T11">error message for misformed formulas </text:span><text:span text:style-name="T7">(default: </text:span><text:span text:style-name="T2">""</text:span><text:span text:style-name="T7">)</text:span></text:p>
            </text:list-item>
            <text:list-item>
              <text:p text:style-name="P35">parentId: ? <text:span text:style-name="T7">(default: 0)</text:span></text:p>
            </text:list-item>
            <text:list-item>
              <text:p text:style-name="P33">width: <text:span text:style-name="T2">column width in the jamovi data editor (default: 100)</text:span></text:p>
            </text:list-item>
            <text:list-item>
              <text:p text:style-name="P33">type: <text:span text:style-name="T2">data type (“integer” [4 byte], “number” [double, 8 byte])</text:span></text:p>
            </text:list-item>
            <text:list-item>
              <text:p text:style-name="P36"><text:soft-page-break/>importName: <text:span text:style-name="T2">name of the column when it was originally imported </text:span><text:span text:style-name="T7">(default: same as “name”) </text:span><text:span text:style-name="T8">– </text:span><text:span text:style-name="T2">"" </text:span><text:span text:style-name="T8">if created new</text:span></text:p>
            </text:list-item>
            <text:list-item>
              <text:p text:style-name="P37">description: <text:span text:style-name="T2">variable description / label </text:span><text:span text:style-name="T10">(default: </text:span><text:span text:style-name="T2">""</text:span><text:span text:style-name="T10">)</text:span></text:p>
            </text:list-item>
            <text:list-item>
              <text:p text:style-name="P33">transform: <text:span text:style-name="T7">for transformed variables</text:span>?</text:p>
            </text:list-item>
            <text:list-item>
              <text:p text:style-name="P33">edits: <text:span text:style-name="T2">marks which rows in the table where edited </text:span><text:span text:style-name="T3">(can contain several ranges as those listed below)</text:span></text:p>
              <text:list>
                <text:list-item>
                  <text:p text:style-name="P44">start</text:p>
                </text:list-item>
                <text:list-item>
                  <text:p text:style-name="P44">end</text:p>
                </text:list-item>
              </text:list>
            </text:list-item>
            <text:list-item>
              <text:p text:style-name="P33">missingValues: ?</text:p>
            </text:list-item>
            <text:list-item>
              <text:p text:style-name="P35"><text:span text:style-name="T7">t</text:span><text:span text:style-name="T3">rimValues (only dataType “Text”): TRUE / FALSE (retain unused levels – trimValues: T doesn’t retain them)</text:span></text:p>
            </text:list-item>
            <text:list-item>
              <text:p text:style-name="P36"><text:span text:style-name="T8">filterNo (</text:span><text:span text:style-name="T3">only </text:span><text:span text:style-name="T8">column</text:span><text:span text:style-name="T3">Type “</text:span><text:span text:style-name="T8">Filter</text:span><text:span text:style-name="T3">”</text:span><text:span text:style-name="T8">): </text:span></text:p>
            </text:list-item>
            <text:list-item>
              <text:p text:style-name="P45">active (<text:span text:style-name="T3">only </text:span>column<text:span text:style-name="T3">Type “</text:span>Filter<text:span text:style-name="T3">”</text:span>): TRUE / FALSE (filter active)</text:p>
            </text:list-item>
          </text:list>
        </text:list-item>
        <text:list-item>
          <text:p text:style-name="P37"><text:span text:style-name="T3">t</text:span><text:span text:style-name="T1">ransforms: </text:span><text:span text:style-name="T10">contains </text:span><text:span text:style-name="T14">a </text:span><text:span text:style-name="T1">description for every </text:span><text:span text:style-name="T10">transformation rule</text:span><text:span text:style-name="T1"> </text:span><text:span text:style-name="T10">(those rules can be applied to several columns)</text:span></text:p>
          <text:list>
            <text:list-item>
              <text:p text:style-name="P32">name: <text:span text:style-name="T10">name of the transformation rule (e.g., </text:span>"Transform 1"<text:span text:style-name="T10">)</text:span></text:p>
            </text:list-item>
            <text:list-item>
              <text:p text:style-name="P32">id: ?</text:p>
            </text:list-item>
            <text:list-item>
              <text:p text:style-name="P32"><text:span text:style-name="T10">s</text:span>uffix: ? <text:span text:style-name="T10">(default: </text:span>""<text:span text:style-name="T10">)</text:span></text:p>
            </text:list-item>
            <text:list-item>
              <text:p text:style-name="P32">formula: <text:span text:style-name="T10">formula for the transformation (e.g., </text:span>"MATCH($source, 'VC', 'OJ')"<text:span text:style-name="T10">)</text:span></text:p>
            </text:list-item>
            <text:list-item>
              <text:p text:style-name="P32">formulaMessage: ?</text:p>
            </text:list-item>
            <text:list-item>
              <text:p text:style-name="P32"><text:span text:style-name="T10">m</text:span>easureType: <text:span text:style-name="T10">(default: None)</text:span></text:p>
              <text:list>
                <text:list-item>
                  <text:p text:style-name="P41">ID</text:p>
                </text:list-item>
                <text:list-item>
                  <text:p text:style-name="P41">Nominal</text:p>
                </text:list-item>
                <text:list-item>
                  <text:p text:style-name="P41">Ordinal</text:p>
                </text:list-item>
                <text:list-item>
                  <text:p text:style-name="P41">Continuous</text:p>
                </text:list-item>
                <text:list-item>
                  <text:p text:style-name="P43">None</text:p>
                </text:list-item>
              </text:list>
            </text:list-item>
            <text:list-item>
              <text:p text:style-name="P37">description: <text:span text:style-name="T2">variable description / label </text:span><text:span text:style-name="T10">(default: </text:span>""<text:span text:style-name="T10">)</text:span></text:p>
            </text:list-item>
          </text:list>
        </text:list-item>
      </text:list>
      <text:p text:style-name="P2"/>
      <text:p text:style-name="P14">xdata.json</text:p>
      <text:p text:style-name="P16">JSON-file that contains meta-data about the value labels (if such labels where defined)</text:p>
      <text:list xml:id="list337684101" text:style-name="L4">
        <text:list-item>
          <text:p text:style-name="P24"><text:span text:style-name="T24">variable </text:span><text:span text:style-name="T3">name: </text:span><text:span text:style-name="T24">matches a column name in the data frame</text:span></text:p>
          <text:list>
            <text:list-item>
              <text:p text:style-name="P25">labels (value labels)</text:p>
            </text:list-item>
          </text:list>
        </text:list-item>
      </text:list>
      <text:p text:style-name="P3"/>
      <text:p text:style-name="P15">data.bin</text:p>
      <text:p text:style-name="P16">Binary file that contains the numeric data of the data set. </text:p>
      <text:p text:style-name="P16">For string data contained in string.bin, there is a place holder column defined that contains ...</text:p>
      <text:p text:style-name="P4"/>
      <text:p text:style-name="P15">string.bin</text:p>
      <text:p text:style-name="P16">Contains string data to be mapped onto the column defined as place holder in data.bin.</text:p>
      <text:p text:style-name="P4"/>
      <text:p text:style-name="P15">index.html</text:p>
      <text:p text:style-name="P16">HTML-file with the current state of the output, the file is, however, re-created (overwritten) each time an analysis is updated. That is, changing the index.html-file does not bear any consequences for the underlying analyses. One may, however, make changes to the comments which are kept.</text:p>
      <text:p text:style-name="P3"/>
      <text:p text:style-name="P11">[0-9][0-9] [ANALYSISNAME]</text:p>
      <text:p text:style-name="P8">Each analysis has a separate folder. <text:span text:style-name="T25">The folder name begins with a </text:span><text:span text:style-name="T15">two-digit code </text:span><text:span text:style-name="T25">that is counted up in the order in which the analyses appear in the file followed by </text:span><text:span text:style-name="T15">[ANALYSISNAME] is the name of the analysis </text:span><text:span text:style-name="T25">(</text:span><text:span text:style-name="T15">in the </text:span><text:span text:style-name="T25">module</text:span><text:span text:style-name="T15"> </text:span><text:span text:style-name="T25">that created the analysis, in most cases the jmv-R-package </text:span><text:span text:style-name="T15">– </text:span><text:span text:style-name="T25">e.g., descriptives)</text:span><text:span text:style-name="T15">.</text:span></text:p>
      <text:p text:style-name="P7">Within that folder, there is one file (analysis) containing RProtoBuf-information about th<text:span text:style-name="T25">at </text:span>analysis and a resources-sub-directory, containing, e.g., <text:span text:style-name="T25">PNG-files with plots produced by the analysis.</text:span></text:p>
      <text:p text:style-name="P10"><text:soft-page-break/>[0-9][0-9] [ANALYSISNAME]/analysis</text:p>
      <text:p text:style-name="P6"><text:span text:style-name="T25">T</text:span>he analysis-file is a binary file that contains the R<text:span text:style-name="T16">P</text:span>rotoBuf <text:span text:style-name="T16">that can be opened in R using the following syntax – replace </text:span><text:span text:style-name="T21">[FILENAME]</text:span><text:span text:style-name="T16"> with the path to your .omv-file and </text:span><text:span text:style-name="T21">[ANALYSIS]</text:span><text:span text:style-name="T16"> with the file that contains the respective analysis within the .omv-file (</text:span><text:span text:style-name="T21">"02 anova/analysis"</text:span><text:span text:style-name="T25">):</text:span></text:p>
      <text:p text:style-name="P20"/>
      <text:p text:style-name="P20"># <text:span text:style-name="T25">initializes the protobuffer </text:span><text:span text:style-name="T22">using </text:span><text:span text:style-name="T25">information </text:span><text:span text:style-name="T22">from </text:span><text:span text:style-name="T25">the jmvcore-R-package</text:span></text:p>
      <text:p text:style-name="P19">RProtoBuf::readProtoFiles(<text:span text:style-name="T18">system.file("jamovi.proto", package="jmvcore")</text:span>)</text:p>
      <text:p text:style-name="P21"># unzip the analysis file</text:p>
      <text:p text:style-name="P19">zip::unzip(<text:span text:style-name="T21">[FILENAME]</text:span>, files=<text:span text:style-name="T16">[ANALYSIS]</text:span>, junkpaths=TRUE)</text:p>
      <text:p text:style-name="P21"># <text:span text:style-name="T20">read </text:span>the infomration contained in analysis <text:span text:style-name="T20">into the proto-buffer</text:span></text:p>
      <text:p text:style-name="P19">analysisPB &lt;- RprotoBuf::read(jamovi.coms.AnalysisResponse, 'analysis')</text:p>
      <text:p text:style-name="P18"># access <text:span text:style-name="T20">a particular </text:span>field within the protobuffer</text:p>
      <text:p text:style-name="P18">analysisPB$name</text:p>
      <text:p text:style-name="P18"/>
      <text:p text:style-name="P9">The fields in the protobuffer are as follows:</text:p>
      <text:list xml:id="list3061100264" text:style-name="L5">
        <text:list-item>
          <text:p text:style-name="P2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Jentschke</meta:initial-creator>
    <meta:creation-date>2020-07-01T09:53:25.141721854</meta:creation-date>
    <dc:date>2021-07-06T13:54:27.884472531</dc:date>
    <meta:editing-duration>P4DT14M43S</meta:editing-duration>
    <meta:editing-cycles>8</meta:editing-cycles>
    <meta:generator>LibreOffice/7.1.4.2$Linux_X86_64 LibreOffice_project/10$Build-2</meta:generator>
    <meta:document-statistic meta:table-count="0" meta:image-count="0" meta:object-count="0" meta:page-count="3" meta:paragraph-count="95" meta:word-count="762" meta:character-count="4935" meta:non-whitespace-character-count="4325"/>
  </office:meta>
</office:document-meta>
</file>